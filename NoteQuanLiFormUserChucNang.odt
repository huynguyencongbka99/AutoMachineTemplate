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0000001627DE8F862.png" manifest:media-type="image/png"/>
  <manifest:file-entry manifest:full-path="Pictures/1000000100000223000002E1832B0A0D.png" manifest:media-type="image/png"/>
  <manifest:file-entry manifest:full-path="Pictures/100000010000025E000001D5A4012801.png" manifest:media-type="image/png"/>
  <manifest:file-entry manifest:full-path="Pictures/100000010000035D000002CD1A0C19EE.png" manifest:media-type="image/png"/>
  <manifest:file-entry manifest:full-path="Pictures/10000001000002F80000012C34CE2EDB.png" manifest:media-type="image/png"/>
  <manifest:file-entry manifest:full-path="Pictures/10000001000002BF000002FC4BB268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新宋体" svg:font-family="新宋体" style:font-family-generic="system" style:font-pitch="variable"/>
  </office:font-face-decls>
  <office:automatic-styles>
    <style:style style:name="P1" style:family="paragraph" style:parent-style-name="Heading_20_1">
      <style:text-properties officeooo:paragraph-rsid="001073c1"/>
    </style:style>
    <style:style style:name="P2" style:family="paragraph" style:parent-style-name="Heading_20_1">
      <style:paragraph-properties fo:break-before="page"/>
    </style:style>
    <style:style style:name="P3" style:family="paragraph" style:parent-style-name="Heading_20_1">
      <style:text-properties officeooo:paragraph-rsid="000d1f12"/>
    </style:style>
    <style:style style:name="P4" style:family="paragraph" style:parent-style-name="Standard">
      <style:text-properties fo:font-size="13pt" officeooo:rsid="0004adee" officeooo:paragraph-rsid="0004adee" style:font-size-asian="11.3500003814697pt" style:font-size-complex="13pt"/>
    </style:style>
    <style:style style:name="P5" style:family="paragraph" style:parent-style-name="Standard">
      <style:text-properties fo:font-size="13pt" officeooo:rsid="00069941" officeooo:paragraph-rsid="00069941" style:font-size-asian="11.3500003814697pt" style:font-size-complex="13pt"/>
    </style:style>
    <style:style style:name="P6" style:family="paragraph" style:parent-style-name="Text_20_body">
      <style:text-properties officeooo:rsid="00069941" officeooo:paragraph-rsid="00069941"/>
    </style:style>
    <style:style style:name="P7" style:family="paragraph" style:parent-style-name="Text_20_body">
      <style:text-properties officeooo:rsid="00086a2d" officeooo:paragraph-rsid="00086a2d"/>
    </style:style>
    <style:style style:name="P8" style:family="paragraph" style:parent-style-name="Text_20_body">
      <style:text-properties officeooo:rsid="0009755a" officeooo:paragraph-rsid="0009755a"/>
    </style:style>
    <style:style style:name="P9" style:family="paragraph" style:parent-style-name="Text_20_body">
      <style:text-properties fo:font-size="13pt" officeooo:rsid="00069941" style:font-size-asian="11.3500003814697pt" style:font-size-complex="13pt"/>
    </style:style>
    <style:style style:name="P10" style:family="paragraph" style:parent-style-name="Text_20_body">
      <style:text-properties officeooo:paragraph-rsid="001073c1"/>
    </style:style>
    <style:style style:name="P11" style:family="paragraph" style:parent-style-name="Text_20_body">
      <style:text-properties officeooo:rsid="001962ef"/>
    </style:style>
    <style:style style:name="T1" style:family="text">
      <style:text-properties officeooo:rsid="00069941"/>
    </style:style>
    <style:style style:name="T2" style:family="text">
      <style:text-properties officeooo:rsid="000d1f12"/>
    </style:style>
    <style:style style:name="T3" style:family="text">
      <style:text-properties officeooo:rsid="001073c1"/>
    </style:style>
    <style:style style:name="T4" style:family="text">
      <style:text-properties officeooo:rsid="00125db8"/>
    </style:style>
    <style:style style:name="T5" style:family="text">
      <style:text-properties officeooo:rsid="001b387e"/>
    </style:style>
    <style:style style:name="T6" style:family="text">
      <style:text-properties officeooo:rsid="001b866c"/>
    </style:style>
    <style:style style:name="T7" style:family="text">
      <style:text-properties officeooo:rsid="001c5e2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text:span text:style-name="T1">Khai báo form</text:span></text:h>
      <text:p text:style-name="P6">Khai báo form được thực hiện ngay trong khu vực khai báo field và function</text:p>
      <text:p text:style-name="P7">Với các class cần khai báo và truyền constructor thì sẽ được gọi ở trong Form Load()</text:p>
      <text:p text:style-name="P8">Tránh trường hợp khởi tạo Instance trong Initialize mà truyền giá trị, đối tượng. Vì trường hợp instance chưa được khởi tạo đã chạy hàm sẽ sinh ra lỗi</text:p>
      <text:p text:style-name="P4"/>
      <text:p text:style-name="P4"/>
      <text:p text:style-name="P4"><draw:frame draw:style-name="fr6" draw:name="图像1" text:anchor-type="char" svg:width="5.1673in" svg:height="3.6874in" draw:z-index="0"><draw:image xlink:href="Pictures/10000001000001F0000001627DE8F862.png" xlink:type="simple" xlink:show="embed" xlink:actuate="onLoad" draw:mime-type="image/png"/></draw:frame></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2 <text:span text:style-name="T2">Sự kiện Form Load</text:span></text:h>
      <text:p text:style-name="P9"/>
      <text:p text:style-name="P5"/>
      <text:p text:style-name="P5"/>
      <text:p text:style-name="P5"/>
      <text:p text:style-name="P5"/>
      <text:p text:style-name="P5"/>
      <text:p text:style-name="P5"/>
      <text:p text:style-name="P5"/>
      <text:h text:style-name="P1" text:outline-level="1"><draw:frame draw:style-name="fr5" draw:name="图像2" text:anchor-type="char" svg:width="6.3134in" svg:height="4.8862in" draw:z-index="1"><draw:image xlink:href="Pictures/100000010000025E000001D5A4012801.png" xlink:type="simple" xlink:show="embed" xlink:actuate="onLoad" draw:mime-type="image/png"/></draw:frame><text:soft-page-break/><text:span text:style-name="T3">3. Ẩn hiện các Control</text:span></text:h>
      <text:p text:style-name="P10"/>
      <text:p text:style-name="P10"/>
      <text:h text:style-name="Heading_20_1" text:outline-level="1"><draw:frame draw:style-name="fr4" draw:name="图像3" text:anchor-type="char" svg:width="6.9252in" svg:height="2.7327in" draw:z-index="2"><draw:image xlink:href="Pictures/10000001000002F80000012C34CE2EDB.png" xlink:type="simple" xlink:show="embed" xlink:actuate="onLoad" draw:mime-type="image/png"/></draw:frame><text:soft-page-break/>4. <text:span text:style-name="T4">Tạo Class riêng để đọc và truyền dữ liệu với từng thiết bị ngoại vi như robot PLC</text:span></text:h>
      <text:p text:style-name="Text_20_body"><draw:frame draw:style-name="fr3" draw:name="图像4" text:anchor-type="char" svg:x="2.3654in" svg:y="-0.0035in" svg:width="3.9862in" svg:height="5.3709in" draw:z-index="3"><draw:image xlink:href="Pictures/1000000100000223000002E1832B0A0D.png" xlink:type="simple" xlink:show="embed" xlink:actuate="onLoad" draw:mime-type="image/png"/></draw:frame></text:p>
      <text:p text:style-name="Text_20_body"/>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 text:outline-level="1">5. <text:span text:style-name="T5">Tạo đối tượng Timer để đo thời gian từ lúc bắt đầu thực hiện lệnh tới lúc kết thúc. Nếu quá thời gian thì báo lỗi. (Luôn lấy giá trị trước khi STOP). </text:span><text:span text:style-name="T6">STOP xong thì có thể start lại bình thường</text:span></text:h>
      <text:p text:style-name="Text_20_body"/>
      <text:p text:style-name="Text_20_body"><draw:frame draw:style-name="fr2" draw:name="图像5" text:anchor-type="char" svg:x="-0.1457in" svg:y="-0.1228in" svg:width="6.9252in" svg:height="5.7665in" draw:z-index="4"><draw:image xlink:href="Pictures/100000010000035D000002CD1A0C19EE.png" xlink:type="simple" xlink:show="embed" xlink:actuate="onLoad" draw:mime-type="image/png"/></draw:frame></text:p>
      <text:h text:style-name="P3" text:outline-level="1"><text:soft-page-break/>6. <text:span text:style-name="T7">Tạo biến toàn cục IsAlarm để báo các thread rằng hệ đang bị lỗi</text:span></text:h>
      <text:p text:style-name="Text_20_body"><draw:frame draw:style-name="fr1" draw:name="图像6" text:anchor-type="char" svg:width="6.9252in" svg:height="7.5256in" draw:z-index="5"><draw:image xlink:href="Pictures/10000001000002BF000002FC4BB268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新宋体"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新宋体"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officeooo:rsid="000d1f12" style:font-size-asian="11.3500003814697pt" style:font-size-complex="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30T13:27:39.629000000</meta:creation-date>
    <dc:date>2026-05-30T14:01:29.628000000</dc:date>
    <meta:editing-duration>PT33M41S</meta:editing-duration>
    <meta:editing-cycles>23</meta:editing-cycles>
    <meta:generator>LibreOffice/24.2.0.3$Windows_X86_64 LibreOffice_project/da48488a73ddd66ea24cf16bbc4f7b9c08e9bea1</meta:generator>
    <meta:document-statistic meta:table-count="0" meta:image-count="6" meta:object-count="0" meta:page-count="5" meta:paragraph-count="9" meta:word-count="152" meta:character-count="709" meta:non-whitespace-character-count="566"/>
  </office:meta>
</office:document-meta>
</file>